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5.png"/>
  <manifest:file-entry manifest:media-type="image/png" manifest:full-path="Pictures/4.png"/>
  <manifest:file-entry manifest:media-type="image/jpeg" manifest:full-path="Pictures/3.jp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Quotations">
      <style:paragraph-properties fo:margin-left="0.5in" fo:margin-right="0in" fo:text-indent="0in" style:auto-text-indent="false"/>
    </style:style>
    <style:style style:name="P21" style:family="paragraph" style:parent-style-name="Text_20_body" style:list-style-name="L19">
      <style:paragraph-properties fo:margin-top="0in" fo:margin-bottom="0in"/>
    </style:style>
    <style:style style:name="P22" style:family="paragraph" style:parent-style-name="Text_20_body" style:list-style-name="L20">
      <style:paragraph-properties fo:margin-top="0in" fo:margin-bottom="0in"/>
    </style:style>
    <style:style style:name="P23" style:family="paragraph" style:parent-style-name="Text_20_body" style:list-style-name="L21">
      <style:paragraph-properties fo:margin-top="0in" fo:margin-bottom="0in"/>
    </style:style>
    <style:style style:name="P24" style:family="paragraph" style:parent-style-name="Text_20_body" style:list-style-name="L22">
      <style:paragraph-properties fo:margin-top="0in" fo:margin-bottom="0in"/>
    </style:style>
    <style:style style:name="P25" style:family="paragraph" style:parent-style-name="Text_20_body" style:list-style-name="L23">
      <style:paragraph-properties fo:margin-top="0in" fo:margin-bottom="0in"/>
    </style:style>
    <style:style style:name="P26" style:family="paragraph" style:parent-style-name="Text_20_body" style:list-style-name="L24">
      <style:paragraph-properties fo:margin-top="0in" fo:margin-bottom="0in"/>
    </style:style>
    <style:style style:name="P27" style:family="paragraph" style:parent-style-name="Text_20_body" style:list-style-name="L25">
      <style:paragraph-properties fo:margin-top="0in" fo:margin-bottom="0in"/>
    </style:style>
    <style:style style:name="P28" style:family="paragraph" style:parent-style-name="Quotations">
      <style:paragraph-properties fo:margin-left="0.5in" fo:margin-right="0in" fo:text-indent="0in" style:auto-text-indent="false"/>
    </style:style>
    <style:style style:name="P29" style:family="paragraph" style:parent-style-name="Text_20_body" style:list-style-name="L26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3744*"/>
    </style:style>
    <style:style style:name="Table1.B" style:family="table-column">
      <style:table-column-properties style:rel-column-width="26214*"/>
    </style:style>
    <style:style style:name="Table1.C" style:family="table-column">
      <style:table-column-properties style:rel-column-width="35576*"/>
    </style:style>
  </office:automatic-styles>
  <office:body>
    <office:text>
      <text:p text:style-name="Title">From ‘<text:span text:style-name="T1">it worked on my notebook</text:span>’ to production-ready machine learning</text:p>
      <text:p text:style-name="Subtitle">Bridging the gap with MLOps</text:p>
      <text:p text:style-name="Author">Lino GALIANA</text:p>
      <text:p text:style-name="Date">2026-06-04</text:p>
      <text:h text:style-name="Heading_20_1" text:outline-level="1"><text:bookmark-start text:name="intro"/>1. Introduction<text:bookmark-end text:name="intro"/></text:h>
      <text:h text:style-name="Heading_20_2" text:outline-level="2"><text:bookmark-start text:name="prod_wall"/>The “production wall”<text:bookmark-end text:name="prod_wall"/></text:h>
      <text:list text:style-name="L1">
        <text:list-item>
          <text:p text:style-name="P1">Most data-driven projects <text:span text:style-name="T2">never deliver value</text:span> (<text:a xlink:type="simple" xlink:href="https://sloanreview.mit.edu/projects/expanding-ais-impact-with-organizational-learning/" office:name=""><text:span text:style-name="Definition">1</text:span></text:a>, <text:a xlink:type="simple" xlink:href="https://hdsr.mitpress.mit.edu/pub/2fu65ujf/release/6" office:name=""><text:span text:style-name="Definition">2</text:span></text:a>, <text:a xlink:type="simple" xlink:href="https://www.researchgate.net/publication/346647451_Beyond_the_Hype_Why_Do_Data-Driven_Projects_Fail" office:name=""><text:span text:style-name="Definition">3</text:span></text:a>)</text:p>
          <text:list text:style-name="L2">
            <text:list-item>
              <text:p text:style-name="P2">Most <text:span text:style-name="T1">data science</text:span> and AI POCs fail when going to production</text:p>
            </text:list-item>
            <text:list-item>
              <text:p text:style-name="P2">How to <text:span text:style-name="T2">move beyond the experimentation stage</text:span>?</text:p>
            </text:list-item>
          </text:list>
        </text:list-item>
      </text:list>
      <text:p text:style-name="First_20_paragraph">. . .</text:p>
      <text:p text:style-name="P3"><text:span text:style-name="T2">Defining production</text:span></text:p>
      <text:p text:style-name="P3"><text:span text:style-name="T2">Going to production</text:span>: making an application <text:span text:style-name="T2">live</text:span> in the space of its <text:span text:style-name="T2">users</text:span></text:p>
      <text:list text:style-name="L3">
        <text:list-item>
          <text:p text:style-name="P4"><text:span text:style-name="T2">Serving</text:span>: <text:span text:style-name="T2">deploying</text:span> the application in a <text:span text:style-name="T2">relevant format</text:span> for its potential users</text:p>
        </text:list-item>
        <text:list-item>
          <text:p text:style-name="P4"><text:span text:style-name="T2">Keeping it alive</text:span>: managing the <text:span text:style-name="T2">lifecycle</text:span> and fostering <text:span text:style-name="T2">continuous improvement</text:span></text:p>
        </text:list-item>
      </text:list>
      <text:p text:style-name="First_20_paragraph">. . .</text:p>
      <text:list text:style-name="L4">
        <text:list-item>
          <text:p text:style-name="P5"><text:span text:style-name="T2">Multiple dimensions</text:span>: domain knowledge, organisation, infrastructure, technical tooling…</text:p>
        </text:list-item>
      </text:list>
      <text:h text:style-name="Heading_20_2" text:outline-level="2"><text:bookmark-start text:name="mlops_circle"/>Fostering continuity<text:bookmark-end text:name="mlops_circle"/></text:h>
      <text:p text:style-name="FigureWithCaption"><draw:frame draw:name="img1" style:rel-width="70.0%" style:rel-height="scale" svg:width="949.0pt" svg:height="356.0pt"><draw:image xlink:href="Pictures/0.png" xlink:type="simple" xlink:show="embed" xlink:actuate="onLoad"/></draw:frame></text:p>
      <text:p text:style-name="FigureCaption">Source: <text:a xlink:type="simple" xlink:href="https://public.dhe.ibm.com/software/data/sw-library/analytics/data-science-lifecycle/#model-implementation" office:name=""><text:span text:style-name="Definition">ibm.com</text:span></text:a></text:p>
      <text:list text:style-name="L5">
        <text:list-item>
          <text:p text:style-name="P6">Applying and extending <text:span text:style-name="T2">software development best practices</text:span></text:p>
          <text:list text:style-name="L6">
            <text:list-item>
              <text:p text:style-name="P7"><text:span text:style-name="T2">DataOps</text:span>: building robust <text:span text:style-name="T2">data pipelines</text:span></text:p>
            </text:list-item>
            <text:list-item>
              <text:p text:style-name="P7"><text:span text:style-name="T2">MLOps</text:span>: deploying and maintaining <text:span text:style-name="T2">ML models</text:span></text:p>
            </text:list-item>
          </text:list>
        </text:list-item>
      </text:list>
      <text:h text:style-name="Heading_20_1" text:outline-level="1"><text:bookmark-start text:name="lifecycles"/>2. Handling data driven projects distinct lifecycles<text:bookmark-end text:name="lifecycles"/></text:h>
      <text:h text:style-name="Heading_20_2" text:outline-level="2"><text:bookmark-start text:name="three-lifecycles-to-master"/>Three lifecycles to master<text:bookmark-end text:name="three-lifecycles-to-master"/></text:h>
      <text:list text:style-name="L7">
        <text:list-item>
          <text:p text:style-name="P8">A robust ML pipeline requires managing <text:span text:style-name="T2">three independent lifecycles</text:span>:</text:p>
          <text:list text:style-name="L8">
            <text:list-item>
              <text:p text:style-name="P9"><text:span text:style-name="T1">Jupyter Notebooks</text:span> does not separate them properly</text:p>
            </text:list-item>
          </text:list>
        </text:list-item>
      </text:list>
      <text:p text:style-name="First_20_paragraph"><draw:frame draw:name="img2" svg:width="902.0pt" svg:height="402.0pt"><draw:image xlink:href="Pictures/1.png" xlink:type="simple" xlink:show="embed" xlink:actuate="onLoad"/></draw:frame></text:p>
      <text:h text:style-name="Heading_20_2" text:outline-level="2"><text:bookmark-start text:name="why-does-this-matter"/>Why does this matter?<text:bookmark-end text:name="why-does-this-matter"/></text:h>
      <text:list text:style-name="L9">
        <text:list-item>
          <text:p text:style-name="P10">Models (weights and inference) are <text:span text:style-name="T2">not static artefacts</text:span>:</text:p>
          <text:list text:style-name="L10">
            <text:list-item>
              <text:p text:style-name="P11">they depend on data, code, <text:span text:style-name="T1">and</text:span> the environment in which they were trained</text:p>
            </text:list-item>
          </text:list>
        </text:list-item>
      </text:list>
      <text:p text:style-name="First_20_paragraph">. . .</text:p>
      <text:list text:style-name="L11">
        <text:list-item>
          <text:p text:style-name="P12">A model result is <text:span text:style-name="T2">only reproducible</text:span> if all three are tracked together</text:p>
        </text:list-item>
      </text:list>
      <text:p text:style-name="First_20_paragraph">. . .</text:p>
      <text:list text:style-name="L12">
        <text:list-item>
          <text:p text:style-name="P13">Failing to manage even one lifecycle leads to:</text:p>
          <text:list text:style-name="L13">
            <text:list-item>
              <text:p text:style-name="P14">“<text:span text:style-name="T1">Works on my machine</text:span>” syndrome</text:p>
            </text:list-item>
            <text:list-item>
              <text:p text:style-name="P14">Inability to roll back a broken update</text:p>
            </text:list-item>
            <text:list-item>
              <text:p text:style-name="P14">Silent regressions caused by data or dependency drift</text:p>
            </text:list-item>
          </text:list>
        </text:list-item>
      </text:list>
      <text:h text:style-name="Heading_20_2" text:outline-level="2"><text:bookmark-start text:name="choosing-appropriate-tools"/>Choosing appropriate tools<text:bookmark-end text:name="choosing-appropriate-tools"/></text:h>
      <text:p text:style-name="First_20_paragraph"><text:span text:style-name="T2">Code</text:span></text:p>
      <text:p text:style-name="Text_20_body">Versioning (<text:span text:style-name="Source_Text">Git</text:span>), improving quality with formatters (<text:span text:style-name="Source_Text">Ruff</text:span>), community standard structure (<text:span text:style-name="Source_Text">cookiecutters</text:span>)…</text:p>
      <text:p text:style-name="Text_20_body"><text:span text:style-name="T2">Configuration</text:span></text:p>
      <text:p text:style-name="Text_20_body">Virtual environments and dependency management (<text:span text:style-name="Source_Text">uv</text:span>), controlling external dependencies (<text:span text:style-name="Source_Text">Docker</text:span>)…</text:p>
      <text:p text:style-name="Text_20_body"><text:span text:style-name="T2">Data</text:span></text:p>
      <text:p text:style-name="Text_20_body">Standardised format (<text:span text:style-name="Source_Text">Parquet</text:span>), cloud storage (<text:span text:style-name="Source_Text">S3</text:span>), pipeline-oriented workflow (<text:span text:style-name="Source_Text">dbt</text:span>)…</text:p>
      <text:p text:style-name="Text_20_body"><draw:frame draw:name="img3" style:rel-width="30.0%" style:rel-height="scale" svg:width="925.0pt" svg:height="437.0pt"><draw:image xlink:href="Pictures/2.png" xlink:type="simple" xlink:show="embed" xlink:actuate="onLoad"/></draw:frame></text:p>
      <text:h text:style-name="Heading_20_1" text:outline-level="1"><text:bookmark-start text:name="from-zero-to-hero-in-production"/>3. From zero to hero in production<text:bookmark-end text:name="from-zero-to-hero-in-production"/></text:h>
      <text:h text:style-name="Heading_20_2" text:outline-level="2"><text:bookmark-start text:name="it-works-on-my-machine"/>“It works on my machine”<text:bookmark-end text:name="it-works-on-my-machine"/></text:h>
      <text:p text:style-name="First_20_paragraph"><draw:frame draw:name="img4" svg:width="500.0pt" svg:height="709.0pt"><draw:image xlink:href="Pictures/3.jpg" xlink:type="simple" xlink:show="embed" xlink:actuate="onLoad"/></draw:frame></text:p>
      <text:h text:style-name="Heading_20_2" text:outline-level="2"><text:bookmark-start text:name="bridging-the-devproduction-gap"/>Bridging the dev/production gap<text:bookmark-end text:name="bridging-the-devproduction-gap"/></text:h>
      <text:list text:style-name="L14">
        <text:list-item>
          <text:p text:style-name="P15"><text:span text:style-name="T2">Environment gap</text:span> is one of the most common sources of failure:</text:p>
          <text:list text:style-name="L15">
            <text:list-item>
              <text:p text:style-name="P16">Production servers might use different OS, libraries, CUDA versions…</text:p>
            </text:list-item>
          </text:list>
        </text:list-item>
      </text:list>
      <text:p text:style-name="First_20_paragraph">. . .</text:p>
      <text:list text:style-name="L16">
        <text:list-item>
          <text:p text:style-name="P17"><text:span text:style-name="T2">Containerisation</text:span> (<text:span text:style-name="Source_Text">Docker</text:span>) solves this by packaging the full runtime alongside the code:</text:p>
          <text:list text:style-name="L17">
            <text:list-item>
              <text:p text:style-name="P18">Same image runs locally, in CI, and in production</text:p>
            </text:list-item>
            <text:list-item>
              <text:p text:style-name="P18">Eliminates “<text:span text:style-name="T1">it works on my machine</text:span>” class of bugs</text:p>
            </text:list-item>
          </text:list>
        </text:list-item>
      </text:list>
      <text:h text:style-name="Heading_20_2" text:outline-level="2"><text:bookmark-start text:name="an-industrialized-project"/>An industrialized project<text:bookmark-end text:name="an-industrialized-project"/></text:h>
      <text:p text:style-name="First_20_paragraph"><text:span text:style-name="T2">Kubernetes</text:span> turns individual containers into an <text:span text:style-name="T2">industrialised, scalable fleet</text:span></text:p>
      <text:p text:style-name="Text_20_body"><draw:frame draw:name="img5" svg:width="1232.0pt" svg:height="478.0pt"><draw:image xlink:href="Pictures/4.png" xlink:type="simple" xlink:show="embed" xlink:actuate="onLoad"/></draw:frame></text:p>
      <text:h text:style-name="Heading_20_2" text:outline-level="2"><text:bookmark-start text:name="mlops-on-kubernetes"/>MLOps on Kubernetes<text:bookmark-end text:name="mlops-on-kubernetes"/></text:h>
      <text:list text:style-name="L18">
        <text:list-item>
          <text:p text:style-name="P19"><text:span text:style-name="T2">Training</text:span>: launch parallel trainings (e.g. cross validation)</text:p>
        </text:list-item>
        <text:list-item>
          <text:p text:style-name="P19"><text:span text:style-name="T2">Model serving</text:span>: expose a versioned model behind a stable endpoint (API)</text:p>
        </text:list-item>
        <text:list-item>
          <text:p text:style-name="P19"><text:span text:style-name="T2">Canary deployments</text:span>: route a fraction of traffic to a new model version before full rollout</text:p>
        </text:list-item>
        <text:list-item>
          <text:p text:style-name="P19"><text:span text:style-name="T2">Rollbacks</text:span>: switch back to a previous version if performance degrades</text:p>
        </text:list-item>
      </text:list>
      <text:p text:style-name="P20"><text:span text:style-name="T2">Note</text:span></text:p>
      <text:p text:style-name="P20">Great improvement but this is only the first phase of a project: continuous improvement requires observability</text:p>
      <text:h text:style-name="Heading_20_1" text:outline-level="1"><text:bookmark-start text:name="adding-experiment-tracking-and-observability"/>4. Adding experiment tracking and observability<text:bookmark-end text:name="adding-experiment-tracking-and-observability"/></text:h>
      <text:h text:style-name="Heading_20_2" text:outline-level="2"><text:bookmark-start text:name="experimentation-phase"/>Experimentation phase<text:bookmark-end text:name="experimentation-phase"/></text:h>
      <text:p text:style-name="First_20_paragraph">During development, practitioners need to:</text:p>
      <text:list text:style-name="L19">
        <text:list-item>
          <text:p text:style-name="P21">Track <text:span text:style-name="T2">every experiment</text:span>: hyperparameters, metrics, artefacts</text:p>
        </text:list-item>
        <text:list-item>
          <text:p text:style-name="P21"><text:span text:style-name="T2">Compare runs</text:span> objectively</text:p>
        </text:list-item>
        <text:list-item>
          <text:p text:style-name="P21"><text:span text:style-name="T2">Select and register</text:span> the best model version</text:p>
        </text:list-item>
      </text:list>
      <text:p text:style-name="First_20_paragraph">. . .</text:p>
      <text:p text:style-name="Text_20_body"><text:span text:style-name="Source_Text">MLFlow</text:span> (and similar platforms!) provides a centralised tracking server, model registry, and serving API</text:p>
      <text:h text:style-name="Heading_20_2" text:outline-level="2"><text:bookmark-start text:name="from-experimentation-to-production-observability"/>From experimentation to production observability<text:bookmark-end text:name="from-experimentation-to-production-observability"/></text:h>
      <text:list text:style-name="L20">
        <text:list-item>
          <text:p text:style-name="P22">The same platforms extend into <text:span text:style-name="T2">production monitoring</text:span>:</text:p>
          <text:list text:style-name="L21">
            <text:list-item>
              <text:p text:style-name="P23">Log <text:span text:style-name="T2">real-world inputs and outputs</text:span></text:p>
            </text:list-item>
            <text:list-item>
              <text:p text:style-name="P23">Compute <text:span text:style-name="T2">performance metrics</text:span> against ground truth or human feedback</text:p>
            </text:list-item>
            <text:list-item>
              <text:p text:style-name="P23">Detect <text:span text:style-name="T2">data drift</text:span> and <text:span text:style-name="T2">concept drift</text:span></text:p>
            </text:list-item>
          </text:list>
        </text:list-item>
      </text:list>
      <text:p text:style-name="First_20_paragraph">. . .</text:p>
      <text:p text:style-name="Text_20_body">LLM-based systems need additional tracking. <text:span text:style-name="Source_Text">Langfuse</text:span> adds:</text:p>
      <text:list text:style-name="L22">
        <text:list-item>
          <text:p text:style-name="P24">Trace-level observability (prompt → retrieval → generation)</text:p>
        </text:list-item>
        <text:list-item>
          <text:p text:style-name="P24">Cost and latency tracking</text:p>
        </text:list-item>
        <text:list-item>
          <text:p text:style-name="P24">Human annotation workflows</text:p>
        </text:list-item>
      </text:list>
      <text:h text:style-name="Heading_20_2" text:outline-level="2"><text:bookmark-start text:name="feedback-loops-and-continuous-improvement"/>Feedback loops and continuous improvement<text:bookmark-end text:name="feedback-loops-and-continuous-improvement"/></text:h>
      <text:p text:style-name="First_20_paragraph"><draw:frame draw:name="img6" svg:width="1110.0pt" svg:height="129.0pt"><draw:image xlink:href="Pictures/5.png" xlink:type="simple" xlink:show="embed" xlink:actuate="onLoad"/></draw:frame></text:p>
      <text:p text:style-name="Text_20_body">. . .</text:p>
      <text:list text:style-name="L23">
        <text:list-item>
          <text:p text:style-name="P25"><text:span text:style-name="T2">Monitoring is not optional</text:span>: a model that worked at launch will degrade as the world changes</text:p>
        </text:list-item>
        <text:list-item>
          <text:p text:style-name="P25"><text:span text:style-name="T2">Feedback loops</text:span> close the gap between offline evaluation and real-world performance</text:p>
        </text:list-item>
        <text:list-item>
          <text:p text:style-name="P25">Good observability turns every production incident into a <text:span text:style-name="T2">training signal</text:span></text:p>
        </text:list-item>
      </text:list>
      <text:h text:style-name="Heading_20_2" text:outline-level="2"><text:bookmark-start text:name="two-paradigms-two-sets-of-operational-constraints"/>Two paradigms, two sets of operational constraints<text:bookmark-end text:name="two-paradigms-two-sets-of-operational-constraint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Table_20_Heading">Supervised ML</text:p>
            </table:table-cell>
            <table:table-cell table:style-name="TableHeaderRowCell" office:value-type="string">
              <text:p text:style-name="Table_20_Heading">LLM-based systems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Training</text:span></text:p>
          </table:table-cell>
          <table:table-cell table:style-name="TableRowCell" office:value-type="string">
            <text:p text:style-name="Table_20_Contents">Full retraining cycle</text:p>
          </table:table-cell>
          <table:table-cell table:style-name="TableRowCell" office:value-type="string">
            <text:p text:style-name="Table_20_Contents">Fine-tuning or prompt engineering</text:p>
          </table:table-cell>
        </table:table-row>
        <table:table-row>
          <table:table-cell table:style-name="TableRowCell" office:value-type="string">
            <text:p text:style-name="Table_20_Contents"><text:span text:style-name="T2">Evaluation</text:span></text:p>
          </table:table-cell>
          <table:table-cell table:style-name="TableRowCell" office:value-type="string">
            <text:p text:style-name="Table_20_Contents">Standard metrics (F1, RMSE…)</text:p>
          </table:table-cell>
          <table:table-cell table:style-name="TableRowCell" office:value-type="string">
            <text:p text:style-name="Table_20_Contents">Requires LLM-as-judge or human review (see <text:a xlink:type="simple" xlink:href="https://hamel.dev/blog/posts/evals/index.html" office:name=""><text:span text:style-name="Definition">4</text:span></text:a>)</text:p>
          </table:table-cell>
        </table:table-row>
        <table:table-row>
          <table:table-cell table:style-name="TableRowCell" office:value-type="string">
            <text:p text:style-name="Table_20_Contents"><text:span text:style-name="T2">Drift</text:span></text:p>
          </table:table-cell>
          <table:table-cell table:style-name="TableRowCell" office:value-type="string">
            <text:p text:style-name="Table_20_Contents">Feature / label drift</text:p>
          </table:table-cell>
          <table:table-cell table:style-name="TableRowCell" office:value-type="string">
            <text:p text:style-name="Table_20_Contents">Prompt drift, outdated knowledge base</text:p>
          </table:table-cell>
        </table:table-row>
        <table:table-row>
          <table:table-cell table:style-name="TableRowCell" office:value-type="string">
            <text:p text:style-name="Table_20_Contents"><text:span text:style-name="T2">Availability</text:span></text:p>
          </table:table-cell>
          <table:table-cell table:style-name="TableRowCell" office:value-type="string">
            <text:p text:style-name="Table_20_Contents">Batch or on the fly ?</text:p>
          </table:table-cell>
          <table:table-cell table:style-name="TableRowCell" office:value-type="string">
            <text:p text:style-name="Table_20_Contents">Continuous</text:p>
          </table:table-cell>
        </table:table-row>
        <table:table-row>
          <table:table-cell table:style-name="TableRowCell" office:value-type="string">
            <text:p text:style-name="Table_20_Contents"><text:span text:style-name="T2">Infrastructure</text:span></text:p>
          </table:table-cell>
          <table:table-cell table:style-name="TableRowCell" office:value-type="string">
            <text:p text:style-name="Table_20_Contents">CPU often sufficient for inference</text:p>
          </table:table-cell>
          <table:table-cell table:style-name="TableRowCell" office:value-type="string">
            <text:p text:style-name="Table_20_Contents">Bigger and bigger GPU (💵💵)</text:p>
          </table:table-cell>
        </table:table-row>
      </table:table>
      <text:h text:style-name="Heading_20_2" text:outline-level="2"><text:bookmark-start text:name="annotation-and-evaluation-challenges"/>Annotation and evaluation challenges<text:bookmark-end text:name="annotation-and-evaluation-challenges"/></text:h>
      <text:p text:style-name="First_20_paragraph"><text:span text:style-name="T2">Supervised learning</text:span>:</text:p>
      <text:list text:style-name="L24">
        <text:list-item>
          <text:p text:style-name="P26">Ground truth is (relatively) well-defined</text:p>
        </text:list-item>
        <text:list-item>
          <text:p text:style-name="P26">Evaluation is largely automated</text:p>
        </text:list-item>
      </text:list>
      <text:p text:style-name="First_20_paragraph">. . .</text:p>
      <text:p text:style-name="Text_20_body"><text:span text:style-name="T2">LLMs</text:span>:</text:p>
      <text:list text:style-name="L25">
        <text:list-item>
          <text:p text:style-name="P27">What is the “correct” output? Often ambiguous</text:p>
        </text:list-item>
        <text:list-item>
          <text:p text:style-name="P27">Human evaluation is expensive and hard to scale</text:p>
        </text:list-item>
        <text:list-item>
          <text:p text:style-name="P27">Automated evaluation (LLM-as-judge) introduces its own biases</text:p>
        </text:list-item>
        <text:list-item>
          <text:p text:style-name="P27">Prompt changes can silently break previously passing evaluations</text:p>
        </text:list-item>
      </text:list>
      <text:p text:style-name="First_20_paragraph">. . .</text:p>
      <text:p text:style-name="P28"><text:span text:style-name="T2">Warning</text:span></text:p>
      <text:p text:style-name="P28">Is it really possible to leapfrog when having missed the ML era ?</text:p>
      <text:h text:style-name="Heading_20_1" text:outline-level="1"><text:bookmark-start text:name="conclusion"/>5. Conclusion<text:bookmark-end text:name="conclusion"/></text:h>
      <text:h text:style-name="Heading_20_2" text:outline-level="2"><text:bookmark-start text:name="key-takeaways"/>Key takeaways<text:bookmark-end text:name="key-takeaways"/></text:h>
      <text:list text:style-name="L26">
        <text:list-item>
          <text:p text:style-name="P29"><text:span text:style-name="T2">Structure your project</text:span> around three independent lifecycles: data, code, environment</text:p>
        </text:list-item>
        <text:list-item>
          <text:p text:style-name="P29"><text:span text:style-name="T2">Track everything</text:span>: experiments, models, prompts — if it’s not tracked, it didn’t happen</text:p>
        </text:list-item>
        <text:list-item>
          <text:p text:style-name="P29"><text:span text:style-name="T2">Monitor in production</text:span>: evaluation does not stop at deployment</text:p>
        </text:list-item>
        <text:list-item>
          <text:p text:style-name="P29"><text:span text:style-name="T2">Know your paradigm</text:span>: supervised ML and LLM-based systems require different tooling and processes</text:p>
        </text:list-item>
      </text:list>
      <text:p text:style-name="First_20_paragraph"><text:span text:style-name="T2">The gap between a notebook that works and a system that delivers value is not only a technical gap: it is an </text:span><text:span text:style-name="T2">operational</text:span><text:span text:style-name="T2"> one.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fr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fr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fr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From ‘it worked on my notebook’ to production-ready machine learning</dc:title>
    <dc:description>ISI Regional Statistics Congress 2026</dc:description>
    <dc:subject/>
    <meta:keyword/>
    <dc:language>fr</dc:language>
    <meta:initial-creator>Lino GALIANA</meta:initial-creator>
    <dc:creator>Lino GALIANA</dc:creator>
    <meta:creation-date>2026-06-03T10:51:10Z</meta:creation-date>
    <dc:date>2026-06-03T10:51:10Z</dc:date>
    <meta:user-defined meta:name="_quarto-vars" meta:value-type="string"/>
    <meta:user-defined meta:name="affiliations" meta:value-type="string"/>
    <meta:user-defined meta:name="authors" meta:value-type="string"/>
    <meta:user-defined meta:name="background-transition" meta:value-type="string">fade</meta:user-defined>
    <meta:user-defined meta:name="biblio-config" meta:value-type="string">True</meta:user-defined>
    <meta:user-defined meta:name="by-affiliation" meta:value-type="string"/>
    <meta:user-defined meta:name="by-author" meta:value-type="string"/>
    <meta:user-defined meta:name="chalkboard" meta:value-type="string">False</meta:user-defined>
    <meta:user-defined meta:name="code-copy" meta:value-type="string">True</meta:user-defined>
    <meta:user-defined meta:name="code-summary" meta:value-type="string">Code</meta:user-defined>
    <meta:user-defined meta:name="controls-back-arrows" meta:value-type="string">faded</meta:user-defined>
    <meta:user-defined meta:name="controls-layout" meta:value-type="string">bottom-right</meta:user-defined>
    <meta:user-defined meta:name="controls-tutorial" meta:value-type="string">True</meta:user-defined>
    <meta:user-defined meta:name="custom-toc" meta:value-type="string">True</meta:user-defined>
    <meta:user-defined meta:name="date" meta:value-type="string">2026-06-04</meta:user-defined>
    <meta:user-defined meta:name="engines" meta:value-type="string"/>
    <meta:user-defined meta:name="execute" meta:value-type="string"/>
    <meta:user-defined meta:name="fig-cap-location" meta:value-type="string">bottom</meta:user-defined>
    <meta:user-defined meta:name="header-includes" meta:value-type="string"/>
    <meta:user-defined meta:name="height" meta:value-type="string">1080</meta:user-defined>
    <meta:user-defined meta:name="history" meta:value-type="string">True</meta:user-defined>
    <meta:user-defined meta:name="include-after" meta:value-type="string"/>
    <meta:user-defined meta:name="include-before" meta:value-type="string"/>
    <meta:user-defined meta:name="institute" meta:value-type="string">Insee</meta:user-defined>
    <meta:user-defined meta:name="institutes" meta:value-type="string"/>
    <meta:user-defined meta:name="jump-to-slide" meta:value-type="string">True</meta:user-defined>
    <meta:user-defined meta:name="labels" meta:value-type="string"/>
    <meta:user-defined meta:name="menu" meta:value-type="string"/>
    <meta:user-defined meta:name="mouse-wheel" meta:value-type="string">False</meta:user-defined>
    <meta:user-defined meta:name="navigation-mode" meta:value-type="string">linear</meta:user-defined>
    <meta:user-defined meta:name="number-depth" meta:value-type="string">1</meta:user-defined>
    <meta:user-defined meta:name="progress" meta:value-type="string">True</meta:user-defined>
    <meta:user-defined meta:name="revealjs-plugins" meta:value-type="string"/>
    <meta:user-defined meta:name="slide-number" meta:value-type="string">c/t</meta:user-defined>
    <meta:user-defined meta:name="slide-tone" meta:value-type="string">False</meta:user-defined>
    <meta:user-defined meta:name="subtitle" meta:value-type="string">Bridging the gap with MLOps</meta:user-defined>
    <meta:user-defined meta:name="theme" meta:value-type="string">css/Insee_Commun.scss</meta:user-defined>
    <meta:user-defined meta:name="toc-title" meta:value-type="string">Table des matières</meta:user-defined>
    <meta:user-defined meta:name="transition" meta:value-type="string">slide</meta:user-defined>
    <meta:user-defined meta:name="transition-speed" meta:value-type="string">slow</meta:user-defined>
    <meta:user-defined meta:name="width" meta:value-type="string">1920</meta:user-defined>
  </office:meta>
</office:document-meta>
</file>